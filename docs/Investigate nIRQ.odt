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5E5C00001D0CEB69FE40.svm"/>
  <manifest:file-entry manifest:media-type="" manifest:full-path="Pictures/200000070000733D00001C6DD9EE1A7A.svm"/>
  <manifest:file-entry manifest:media-type="" manifest:full-path="Pictures/20000007000069BC00001BB4AE7AEC49.svm"/>
  <manifest:file-entry manifest:media-type="" manifest:full-path="Pictures/200000070000622F00001D0C27B114A3.svm"/>
  <manifest:file-entry manifest:media-type="" manifest:full-path="Pictures/200000070000672500001CD7F81EE1DD.svm"/>
  <manifest:file-entry manifest:media-type="" manifest:full-path="Pictures/200000070000563200001DDFF9BBDCAA.svm"/>
  <manifest:file-entry manifest:media-type="" manifest:full-path="Pictures/20000007000061AB00001C6D3A1EA8B2.svm"/>
  <manifest:file-entry manifest:media-type="" manifest:full-path="Pictures/2000000700006A5900001E49B41A694D.svm"/>
  <manifest:file-entry manifest:media-type="" manifest:full-path="Pictures/20000007000061E100001CF1339ECC7B.svm"/>
  <manifest:file-entry manifest:media-type="" manifest:full-path="Pictures/200000070000606D00001C6DD17D7BC3.svm"/>
  <manifest:file-entry manifest:media-type="" manifest:full-path="Pictures/200000070000689800001CBCAC614541.svm"/>
  <manifest:file-entry manifest:media-type="" manifest:full-path="Pictures/200000070000644000001CA2D36C003B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8pt" style:font-size-asian="8pt" style:font-size-complex="8pt"/>
    </style:style>
    <style:style style:name="T1" style:family="text">
      <style:text-properties style:text-position="super 58%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00:C435 8E7000 <text:s text:c="9"/><text:tab/> <text:s text:c="2"/>122: handle_res:<text:tab/>lds<text:tab/>#0x7000<text:tab/><text:tab/><text:tab/><text:tab/>; need a stack for interrupt tests</text:p>
      <text:p text:style-name="P1">00:C438 0E <text:s text:c="13"/><text:tab/> <text:s text:c="2"/>123: <text:tab/><text:tab/>cli<text:tab/><text:tab/><text:tab/><text:tab/><text:tab/>; enable IRQs</text:p>
      <text:p text:style-name="P1">00:C439 CEC434 <text:s text:c="9"/><text:tab/> <text:s text:c="2"/>124: <text:tab/><text:tab/>ldx<text:tab/>#_CRTC_REG_TAB_mo7+11</text:p>
      <text:p text:style-name="P1">00:C43C C60B <text:s text:c="11"/><text:tab/> <text:s text:c="2"/>125: <text:tab/><text:tab/>ldab<text:tab/>#11</text:p>
      <text:p text:style-name="P1">00:C43E F7FE00 <text:s text:c="9"/><text:tab/> <text:s text:c="2"/>126: crlp1:<text:tab/><text:tab/>stab<text:tab/>CRTC_A</text:p>
      <text:h text:style-name="Heading_20_2" text:outline-level="2">IRQ low during vector fetch (RESET)</text:h>
      <text:p text:style-name="Standard"><draw:frame draw:style-name="fr1" draw:name="graphics1" text:anchor-type="paragraph" svg:width="25.058cm" svg:height="7.408cm" draw:z-index="0"><draw:image xlink:href="Pictures/20000007000061E100001CF1339ECC7B.svm" xlink:type="simple" xlink:show="embed" xlink:actuate="onLoad"/></draw:frame></text:p>
      <text:p text:style-name="Standard">4<text:span text:style-name="T1">th</text:span> instruction interrupted (instruction after CLI is executed)</text:p>
      <text:p text:style-name="Standard"/>
      <text:h text:style-name="Heading_20_2" text:outline-level="2"><text:soft-page-break/>IRQ low during cycle 12, instruction fetch, next instruction is interrupted</text:h>
      <text:p text:style-name="Text_20_body"><draw:frame draw:style-name="fr2" draw:name="graphics2" text:anchor-type="paragraph" svg:width="25.7cm" svg:height="6.733cm" draw:z-index="1"><draw:image xlink:href="Pictures/20000007000069BC00001BB4AE7AEC49.svm" xlink:type="simple" xlink:show="embed" xlink:actuate="onLoad"/></draw:frame></text:p>
      <text:p text:style-name="Text_20_body">Interrupts before this point all interrupt C43C</text:p>
      <text:p text:style-name="Text_20_body">Interrupt during instruction fetch is ignored – same as NMI</text:p>
      <text:h text:style-name="Heading_20_1" text:outline-level="1">NMI and IRQ coincident on instruction fetch</text:h>
      <text:p text:style-name="Standard"><draw:frame draw:style-name="fr1" draw:name="graphics3" text:anchor-type="paragraph" svg:width="25.665cm" svg:height="5.166cm" draw:z-index="2"><draw:image xlink:href="Pictures/200000070000644000001CA2D36C003B.svm" xlink:type="simple" xlink:show="embed" xlink:actuate="onLoad"/></draw:frame></text:p>
      <text:p text:style-name="Standard"><text:soft-page-break/>NMI wins – vector FFFC fetched</text:p>
      <text:h text:style-name="Heading_20_1" text:outline-level="1"><draw:frame draw:style-name="fr3" draw:name="graphics4" text:anchor-type="paragraph" svg:x="0.071cm" svg:y="1.169cm" svg:width="25.7cm" svg:height="7.317cm" draw:z-index="3"><draw:image xlink:href="Pictures/2000000700006A5900001E49B41A694D.svm" xlink:type="simple" xlink:show="embed" xlink:actuate="onLoad"/></draw:frame>NMI one cycle after IRQ (during fetch)</text:h>
      <text:p text:style-name="Text_20_body"/>
      <text:p text:style-name="Text_20_body">NMI still wins</text:p>
      <text:p text:style-name="Text_20_body">NMI 2 cycles later</text:p>
      <text:p text:style-name="Text_20_body"><draw:frame draw:style-name="fr4" draw:name="graphics5" text:anchor-type="paragraph" svg:width="25.7cm" svg:height="7.186cm" draw:z-index="4"><draw:image xlink:href="Pictures/200000070000672500001CD7F81EE1DD.svm" xlink:type="simple" xlink:show="embed" xlink:actuate="onLoad"/></draw:frame><text:soft-page-break/></text:p>
      <text:p text:style-name="Text_20_body">NMI still wins</text:p>
      <text:h text:style-name="Heading_20_1" text:outline-level="1">IRQ wins if NMI not asserted before cycle before vector fetch</text:h>
      <text:p text:style-name="Text_20_body"><draw:frame draw:style-name="fr4" draw:name="graphics6" text:anchor-type="paragraph" svg:width="25.7cm" svg:height="7.059cm" draw:z-index="5"><draw:image xlink:href="Pictures/200000070000689800001CBCAC614541.svm" xlink:type="simple" xlink:show="embed" xlink:actuate="onLoad"/></draw:frame></text:p>
      <text:p text:style-name="Text_20_body"><text:soft-page-break/>Decision must be latched cycle before vector fetch?</text:p>
      <text:h text:style-name="Heading_20_1" text:outline-level="1">Single cycle IRQ during fetch phi2</text:h>
      <text:p text:style-name="Text_20_body"><draw:frame draw:style-name="fr4" draw:name="graphics7" text:anchor-type="paragraph" svg:width="25.7cm" svg:height="6.339cm" draw:z-index="6"><draw:image xlink:href="Pictures/200000070000733D00001C6DD9EE1A7A.svm" xlink:type="simple" xlink:show="embed" xlink:actuate="onLoad"/></draw:frame></text:p>
      <text:p text:style-name="Text_20_body">Maybe registered, or just the default if not NMI, RESET or SWI?</text:p>
      <text:h text:style-name="Heading_20_1" text:outline-level="1"><text:soft-page-break/>Single cycle IRQ during decode phi2</text:h>
      <text:p text:style-name="Text_20_body"><draw:frame draw:style-name="fr3" draw:name="graphics10" text:anchor-type="paragraph" svg:x="0.095cm" svg:y="-0.064cm" svg:width="25.7cm" svg:height="6.789cm" draw:z-index="9"><draw:image xlink:href="Pictures/200000070000606D00001C6DD17D7BC3.svm" xlink:type="simple" xlink:show="embed" xlink:actuate="onLoad"/></draw:frame></text:p>
      <text:p text:style-name="Text_20_body">Still interrupted so must be registered somehow but when is it cleared?</text:p>
      <text:p text:style-name="Text_20_body"/>
      <text:p text:style-name="Text_20_body"/>
      <text:p text:style-name="Text_20_body"/>
      <text:h text:style-name="Heading_20_1" text:outline-level="1"><text:soft-page-break/>Single cycle IRQ followed by NMI</text:h>
      <text:p text:style-name="Text_20_body"><draw:frame draw:style-name="fr3" draw:name="graphics9" text:anchor-type="paragraph" svg:x="0.415cm" svg:y="7.435cm" svg:width="25.003cm" svg:height="7.278cm" draw:z-index="8"><draw:image xlink:href="Pictures/20000007000061AB00001C6D3A1EA8B2.svm" xlink:type="simple" xlink:show="embed" xlink:actuate="onLoad"/></draw:frame><draw:frame draw:style-name="fr1" draw:name="graphics8" text:anchor-type="paragraph" svg:width="25.135cm" svg:height="7.437cm" draw:z-index="7"><draw:image xlink:href="Pictures/200000070000622F00001D0C27B114A3.svm" xlink:type="simple" xlink:show="embed" xlink:actuate="onLoad"/></draw:frame></text:p>
      <text:p text:style-name="Text_20_body">IRQ is ignored?! So maybe IRQ not latched but assumed if initiated then dropped?</text:p>
      <text:h text:style-name="Heading_20_1" text:outline-level="1"><text:soft-page-break/>Single cycle interrupt during SWI stacking is ignored</text:h>
      <text:p text:style-name="Text_20_body"><draw:frame draw:style-name="fr5" draw:name="graphics11" text:anchor-type="paragraph" svg:width="22.066cm" svg:height="7.646cm" draw:z-index="10"><draw:image xlink:href="Pictures/200000070000563200001DDFF9BBDCAA.svm" xlink:type="simple" xlink:show="embed" xlink:actuate="onLoad"/></draw:frame><draw:frame draw:style-name="fr6" draw:name="graphics12" text:anchor-type="paragraph" svg:x="0.714cm" svg:y="7.733cm" svg:width="24.156cm" svg:height="7.437cm" draw:z-index="11"><draw:image xlink:href="Pictures/2000000700005E5C00001D0CEB69FE40.svm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om Bee</meta:initial-creator>
    <meta:creation-date>2026-04-29T19:57:48.42</meta:creation-date>
    <dc:date>2026-05-04T17:08:09.74</dc:date>
    <dc:creator>Dom Bee</dc:creator>
    <meta:editing-duration>P1DT22H38M50S</meta:editing-duration>
    <meta:editing-cycles>5</meta:editing-cycles>
    <meta:generator>OpenOffice/4.1.15$Win32 OpenOffice.org_project/4115m2$Build-9813</meta:generator>
    <meta:document-statistic meta:table-count="0" meta:image-count="12" meta:object-count="0" meta:page-count="8" meta:paragraph-count="25" meta:word-count="191" meta:character-count="1221"/>
  </office:meta>
</office:document-meta>
</file>
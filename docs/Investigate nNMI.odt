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7F0000020263112196D.svm"/>
  <manifest:file-entry manifest:media-type="" manifest:full-path="Pictures/200000070000629A00001D5B7EEBE30C.svm"/>
  <manifest:file-entry manifest:media-type="" manifest:full-path="Pictures/200000070000570700002202887F034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NMI low during vector fetch (RESET)</text:h>
      <text:p text:style-name="Standard"><draw:frame draw:style-name="fr1" draw:name="graphics1" text:anchor-type="paragraph" svg:x="0.711cm" svg:y="0cm" svg:width="22.28cm" svg:height="8.707cm" draw:z-index="0"><draw:image xlink:href="Pictures/200000070000570700002202887F0348.svm" xlink:type="simple" xlink:show="embed" xlink:actuate="onLoad"/></draw:frame></text:p>
      <text:p text:style-name="Standard">First instruction is interrupted, PC repeats</text:p>
      <text:p text:style-name="Standard"/>
      <text:h text:style-name="Heading_20_2" text:outline-level="2"><text:soft-page-break/>NMI low during instruction fetch, next instruction is interrupted</text:h>
      <text:p text:style-name="Standard"><draw:frame draw:style-name="fr1" draw:name="graphics2" text:anchor-type="paragraph" svg:x="0.642cm" svg:y="0cm" svg:width="18.417cm" svg:height="8.23cm" draw:z-index="1"><draw:image xlink:href="Pictures/20000007000047F0000020263112196D.svm" xlink:type="simple" xlink:show="embed" xlink:actuate="onLoad"/></draw:frame></text:p>
      <text:h text:style-name="Heading_20_2" text:outline-level="2">NMI low during first operand fetch (16 bit immediate)</text:h>
      <text:p text:style-name="Text_20_body">Same as above</text:p>
      <text:h text:style-name="Heading_20_2" text:outline-level="2">NMI low during second operand fetch (16 bit immediate)</text:h>
      <text:p text:style-name="Text_20_body">Same as above</text:p>
      <text:h text:style-name="Heading_20_2" text:outline-level="2"><text:soft-page-break/>NMI low during second instruction fetch </text:h>
      <text:p text:style-name="Text_20_body"><draw:frame draw:style-name="fr2" draw:name="graphics3" text:anchor-type="paragraph" svg:width="25.241cm" svg:height="7.514cm" draw:z-index="2"><draw:image xlink:href="Pictures/200000070000629A00001D5B7EEBE30C.svm" xlink:type="simple" xlink:show="embed" xlink:actuate="onLoad"/></draw:frame></text:p>
      <text:p text:style-name="Text_20_body">Interrupts 3<text:span text:style-name="T1">rd</text:span> instructio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 Bee</meta:initial-creator>
    <meta:creation-date>2026-04-29T19:57:48.42</meta:creation-date>
    <meta:document-statistic meta:table-count="0" meta:image-count="3" meta:object-count="0" meta:page-count="3" meta:paragraph-count="9" meta:word-count="54" meta:character-count="343"/>
    <dc:date>2026-04-30T15:10:35.89</dc:date>
    <dc:creator>Dom Bee</dc:creator>
    <meta:editing-duration>PT18H42M27S</meta:editing-duration>
    <meta:editing-cycles>1</meta:editing-cycles>
    <meta:generator>OpenOffice/4.1.15$Win32 OpenOffice.org_project/4115m2$Build-9813</meta:generator>
  </office:meta>
</office:document-meta>
</file>
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61900001B306175669D.svm"/>
  <manifest:file-entry manifest:media-type="" manifest:full-path="Pictures/200000070000561900001BE908544F70.svm"/>
  <manifest:file-entry manifest:media-type="" manifest:full-path="Pictures/20000007000055C900001C03E84C56AC.svm"/>
  <manifest:file-entry manifest:media-type="" manifest:full-path="Pictures/200000070000563300001C3844C365E3.svm"/>
  <manifest:file-entry manifest:media-type="" manifest:full-path="Pictures/200000070000557A00001AC630CBC122.svm"/>
  <manifest:file-entry manifest:media-type="image/png" manifest:full-path="Pictures/1000000000000342000001F584373F47.png"/>
  <manifest:file-entry manifest:media-type="" manifest:full-path="Pictures/20000007000055E400001B7F0C782DB1.svm"/>
  <manifest:file-entry manifest:media-type="" manifest:full-path="Pictures/20000007000055E400001C1E9D0A6428.svm"/>
  <manifest:file-entry manifest:media-type="" manifest:full-path="Pictures/20000007000055FE00001CBC2ED357E8.svm"/>
  <manifest:file-entry manifest:media-type="" manifest:full-path="Pictures/20000007000055AF00001C03D84319D4.svm"/>
  <manifest:file-entry manifest:media-type="" manifest:full-path="Pictures/20000007000055AF00001AC641F181A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contains traces and descriptions of tests against a real 68B00 the tests are to flush out the bahviour of the HALT pin not covered in the datasheets.</text:p>
      <text:p text:style-name="Standard"/>
      <text:p text:style-name="Standard">NOTE: nHALT is latched by cpu at end of phi1 (subject to tPCS)</text:p>
      <text:p text:style-name="Standard">NOTE: nRES is lattched by cpu at end of phi2 (subject to tPCS)</text:p>
      <text:h text:style-name="Heading_20_1" text:outline-level="1">HALT active during reset</text:h>
      <text:p text:style-name="Standard"><draw:frame draw:style-name="fr1" draw:name="graphics1" text:anchor-type="paragraph" svg:width="17cm" svg:height="5.323cm" draw:z-index="0"><draw:image xlink:href="Pictures/200000070000557A00001AC630CBC122.svm" xlink:type="simple" xlink:show="embed" xlink:actuate="onLoad"/></draw:frame></text:p>
      <text:p text:style-name="Standard">Vector is fetched then bus released, first instruction executed cycle after halt release</text:p>
      <text:h text:style-name="Heading_20_1" text:outline-level="1">HALT occurs during first cycle of VECTOR FETCH after RESET</text:h>
      <text:p text:style-name="Standard"><draw:frame draw:style-name="fr3" draw:name="graphics2" text:anchor-type="paragraph" svg:x="0cm" svg:y="0.289cm" svg:width="17cm" svg:height="5.311cm" draw:z-index="2"><draw:image xlink:href="Pictures/20000007000055AF00001AC641F181A0.svm" xlink:type="simple" xlink:show="embed" xlink:actuate="onLoad"/></draw:frame></text:p>
      <text:p text:style-name="Standard">The vector is fetched, first instruction held until nHALT released</text:p>
      <text:p text:style-name="Standard"/>
      <text:h text:style-name="Heading_20_1" text:outline-level="1">HALT occurs during second cycle of VECTOR FETCH after RESET</text:h>
      <text:p text:style-name="Standard"><draw:frame draw:style-name="fr2" draw:name="graphics3" text:anchor-type="paragraph" svg:width="17cm" svg:height="5.368cm" draw:z-index="1"><draw:image xlink:href="Pictures/200000070000561900001B306175669D.svm" xlink:type="simple" xlink:show="embed" xlink:actuate="onLoad"/></draw:frame></text:p>
      <text:p text:style-name="Standard"><text:soft-page-break/>Vector fetched, first instruction is halted</text:p>
      <text:p text:style-name="Standard"/>
      <text:h text:style-name="Heading_20_1" text:outline-level="1">HALT occurs during fetch of first instruction</text:h>
      <text:p text:style-name="Text_20_body"><draw:frame draw:style-name="fr1" draw:name="graphics4" text:anchor-type="paragraph" svg:width="17cm" svg:height="5.556cm" draw:z-index="3"><draw:image xlink:href="Pictures/20000007000055AF00001C03D84319D4.svm" xlink:type="simple" xlink:show="embed" xlink:actuate="onLoad"/></draw:frame></text:p>
      <text:p text:style-name="Text_20_body">First instruction executed, next halted</text:p>
      <text:h text:style-name="Heading_20_1" text:outline-level="1">HALT occurs during 1<text:span text:style-name="T1">st</text:span> operand of 3 byte instruction</text:h>
      <text:p text:style-name="Text_20_body"><draw:frame draw:style-name="fr1" draw:name="graphics5" text:anchor-type="paragraph" svg:width="17cm" svg:height="5.442cm" draw:z-index="4"><draw:image xlink:href="Pictures/20000007000055E400001B7F0C782DB1.svm" xlink:type="simple" xlink:show="embed" xlink:actuate="onLoad"/></draw:frame></text:p>
      <text:p text:style-name="Standard">Next instruction is halted</text:p>
      <text:p text:style-name="Standard"/>
      <text:h text:style-name="Heading_20_1" text:outline-level="1">HALT occurs during 2<text:span text:style-name="T1">nd</text:span> operand of 3 byte instruction</text:h>
      <text:p text:style-name="Text_20_body"><draw:frame draw:style-name="fr1" draw:name="graphics6" text:anchor-type="paragraph" svg:width="17cm" svg:height="5.563cm" draw:z-index="5"><draw:image xlink:href="Pictures/200000070000563300001C3844C365E3.svm" xlink:type="simple" xlink:show="embed" xlink:actuate="onLoad"/></draw:frame></text:p>
      <text:p text:style-name="Standard">Next instruction is still halted</text:p>
      <text:p text:style-name="Standard"><text:soft-page-break/></text:p>
      <text:h text:style-name="Heading_20_1" text:outline-level="1">Halt blips low during 1<text:span text:style-name="T1">st</text:span> vector fetch</text:h>
      <text:p text:style-name="Standard">Is ignored</text:p>
      <text:p text:style-name="Standard"/>
      <text:h text:style-name="Heading_20_1" text:outline-level="1">Halt blips low during 2<text:span text:style-name="T1">nd</text:span> vector fetch</text:h>
      <text:p text:style-name="Standard"><draw:frame draw:style-name="fr2" draw:name="graphics7" text:anchor-type="paragraph" svg:width="17cm" svg:height="10.211cm" draw:z-index="6"><draw:image xlink:href="Pictures/1000000000000342000001F584373F47.png" xlink:type="simple" xlink:show="embed" xlink:actuate="onLoad"/></draw:frame></text:p>
      <text:p text:style-name="Standard">Cycle after 2<text:span text:style-name="T1">nd</text:span> vector fetch is skipped NOTE – BA only asserted for half cycle</text:p>
      <text:p text:style-name="Standard"/>
      <text:h text:style-name="Heading_20_1" text:outline-level="1">Halt blips low during 1<text:span text:style-name="T1">st</text:span> fetch</text:h>
      <text:p text:style-name="Standard">Ignored</text:p>
      <text:h text:style-name="Heading_20_1" text:outline-level="1">Halt blips low during oper 1 of 16 bit immed</text:h>
      <text:p text:style-name="Text_20_body">Ignored</text:p>
      <text:h text:style-name="Heading_20_1" text:outline-level="1"><text:soft-page-break/>Halt blips low during oper 2 of 16 bit immed</text:h>
      <text:p text:style-name="Text_20_body"><draw:frame draw:style-name="fr1" draw:name="graphics8" text:anchor-type="paragraph" svg:width="17cm" svg:height="5.549cm" draw:z-index="7"><draw:image xlink:href="Pictures/20000007000055C900001C03E84C56AC.svm" xlink:type="simple" xlink:show="embed" xlink:actuate="onLoad"/></draw:frame></text:p>
      <text:p text:style-name="Text_20_body">Next instruction pauses, ½ cycle BA</text:p>
      <text:h text:style-name="Heading_20_1" text:outline-level="1">Halt blips low during fetch </text:h>
      <text:p text:style-name="Text_20_body">Ignored</text:p>
      <text:h text:style-name="Heading_20_1" text:outline-level="1"><draw:frame draw:style-name="fr3" draw:name="graphics9" text:anchor-type="paragraph" svg:x="0cm" svg:y="1.397cm" svg:width="17cm" svg:height="5.565cm" draw:z-index="8"><draw:image xlink:href="Pictures/20000007000055E400001C1E9D0A6428.svm" xlink:type="simple" xlink:show="embed" xlink:actuate="onLoad"/></draw:frame>Halt blips high during 1<text:span text:style-name="T1">st</text:span> vector</text:h>
      <text:h text:style-name="Heading_20_1" text:outline-level="1"/>
      <text:p text:style-name="Text_20_body">Ignored, vector fetched then halt.</text:p>
      <text:p text:style-name="Text_20_body">Following blip high shows a normal “single-step” </text:p>
      <text:h text:style-name="Heading_20_1" text:outline-level="1"><text:soft-page-break/>Halt blips high during 2nd vector</text:h>
      <text:h text:style-name="Heading_20_1" text:outline-level="1"><draw:frame draw:style-name="fr1" draw:name="graphics10" text:anchor-type="paragraph" svg:width="17cm" svg:height="5.68cm" draw:z-index="9"><draw:image xlink:href="Pictures/20000007000055FE00001CBC2ED357E8.svm" xlink:type="simple" xlink:show="embed" xlink:actuate="onLoad"/></draw:frame></text:h>
      <text:p text:style-name="Text_20_body">Following instruction is executed immediately</text:p>
      <text:h text:style-name="Heading_20_1" text:outline-level="1"><draw:frame draw:style-name="fr3" draw:name="graphics11" text:anchor-type="paragraph" svg:x="0cm" svg:y="1.699cm" svg:width="17cm" svg:height="5.51cm" draw:z-index="10"><draw:image xlink:href="Pictures/200000070000561900001BE908544F70.svm" xlink:type="simple" xlink:show="embed" xlink:actuate="onLoad"/></draw:frame>Halt blips high during cycle after 2<text:span text:style-name="T1">nd</text:span> vector fetch</text:h>
      <text:h text:style-name="Heading_20_1" text:outline-level="1"/>
      <text:p text:style-name="Text_20_body">As expected for first instruction, as expected 2<text:span text:style-name="T1">nd</text:span> instruction is delayed 1 cycle when previous LIC cycle is nHALT</text:p>
      <text:h text:style-name="Heading_20_1" text:outline-level="1">Conclusions</text:h>
      <text:p text:style-name="Text_20_body">HALT is registered and acted on during the cycle BEFORE a fetchin the </text:p>
      <text:p text:style-name="Text_20_body">CORE needs a LIC signal to allow BA to go high during a halt after phi1 – or should it just be BA combines in CORE?</text:p>
      <text:p text:style-name="Text_20_body">In use with real CPU BA should be registered in middle of phi1 like A, RnW etc and otherwise igno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 Bee</meta:initial-creator>
    <meta:creation-date>2026-04-29T16:03:26.13</meta:creation-date>
    <meta:generator>OpenOffice/4.1.15$Win32 OpenOffice.org_project/4115m2$Build-9813</meta:generator>
    <dc:date>2026-04-29T19:12:14.56</dc:date>
    <dc:creator>Dom Bee</dc:creator>
    <meta:editing-duration>PT3H8M45S</meta:editing-duration>
    <meta:editing-cycles>7</meta:editing-cycles>
    <meta:document-statistic meta:table-count="0" meta:image-count="11" meta:object-count="0" meta:page-count="5" meta:paragraph-count="38" meta:word-count="335" meta:character-count="1893"/>
  </office:meta>
</office:document-meta>
</file>